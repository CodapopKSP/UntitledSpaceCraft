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D0000033B8565840B7319D1D8.png" manifest:media-type="image/png"/>
  <manifest:file-entry manifest:full-path="Pictures/10009D8000004912000063DC78131A22DD18C42C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272e37" officeooo:paragraph-rsid="001da67f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2ea305" officeooo:paragraph-rsid="002ea30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1c32e5" officeooo:paragraph-rsid="001c32e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2ea305" officeooo:paragraph-rsid="002ea305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irmware Execution Flow</text:p>
      <text:p text:style-name="P3"/>
      <text:p text:style-name="P2">Untitled Space Craft firmware is written in C/C++ and targets the Arduino platform. On power-up, the Hub initializes the hardware, discovers connected modules, and attempts to establish communication with Kerbal Simpit.</text:p>
      <text:p text:style-name="P2"/>
      <text:p text:style-name="P2">Once it is ready, it will repeatedly attempt to connect to Simpit for either KSP1 or KSP2. During this time, if 3 repeated inputs are detected, it will enter Keyboard Emulation mode. If the connection to Simpit is successful, it will enter KSP mode.</text:p>
      <text:p text:style-name="P1"><draw:frame draw:style-name="fr1" draw:name="Image2" text:anchor-type="char" svg:x="0.4563in" svg:y="0.2319in" svg:width="5.8161in" svg:height="7.948in" draw:z-index="0"><draw:image xlink:href="Pictures/10009D8000004912000063DC78131A22DD18C42C.svg" xlink:type="simple" xlink:show="embed" xlink:actuate="onLoad" draw:mime-type="image/svg+xml"/><draw:image xlink:href="Pictures/100000010000025D0000033B8565840B7319D1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0T20:52:19.657166870</meta:creation-date>
    <dc:date>2026-06-22T22:52:22.865515381</dc:date>
    <meta:editing-duration>PT31M30S</meta:editing-duration>
    <meta:editing-cycles>12</meta:editing-cycles>
    <meta:generator>LibreOffice/7.3.7.2$Linux_X86_64 LibreOffice_project/30$Build-2</meta:generator>
    <meta:document-statistic meta:table-count="0" meta:image-count="1" meta:object-count="0" meta:page-count="1" meta:paragraph-count="3" meta:word-count="78" meta:character-count="491" meta:non-whitespace-character-count="416"/>
  </office:meta>
</office:document-meta>
</file>