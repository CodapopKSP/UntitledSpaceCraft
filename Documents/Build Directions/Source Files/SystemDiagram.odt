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342794A119F5C076BDA.png" manifest:media-type="image/png"/>
  <manifest:file-entry manifest:full-path="Pictures/1000C301000049120000659DF1719F42A4F194C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bae81" officeooo:paragraph-rsid="002bae8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c32e5" officeooo:paragraph-rsid="001c32e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adb15" officeooo:paragraph-rsid="002adb15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2d7f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stem Diagram</text:p>
      <text:p text:style-name="P2"/>
      <text:p text:style-name="P1">Untitled Space Craft utilizes the <text:a xlink:type="simple" xlink:href="https://github.com/Simpit-team/KerbalSimpitRevamped" text:style-name="Internet_20_link" text:visited-style-name="Visited_20_Internet_20_Link">Kerbal Simpit Revamped</text:a> mod for KSP in order to communicate with the game. The mod talks to controllers over the serial bus. Multiple containers can be connected to Simpit by editing the <text:span text:style-name="T2">settings.cfg</text:span> file in the <text:span text:style-name="T2">GameData/KerbalSimpit</text:span> folder.</text:p>
      <text:p text:style-name="P1"/>
      <text:p text:style-name="P1">Each container has a Hub, <text:span text:style-name="T4">powered by Arduino Micro,</text:span> with up to 8 modules <text:span text:style-name="T4">driven by ATtiny microcontrollers</text:span>. They communicate via the i2C protocol. Each module has one (for<text:span text:style-name="T1"> just control</text:span>) or two (<text:span text:style-name="T1">for control and display</text:span>) addresses, designated with <text:span text:style-name="T3">CTRL</text:span> and <text:span text:style-name="T3">DSPL</text:span>.<draw:frame draw:style-name="fr1" draw:name="Image1" text:anchor-type="char" svg:x="0.4626in" svg:y="0.7736in" svg:width="5.7508in" svg:height="7.9972in" draw:z-index="0"><draw:image xlink:href="Pictures/1000C301000049120000659DF1719F42A4F194CC.svg" xlink:type="simple" xlink:show="embed" xlink:actuate="onLoad" draw:mime-type="image/svg+xml"/><draw:image xlink:href="Pictures/100000010000025800000342794A119F5C076B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0:52:19.657166870</meta:creation-date>
    <dc:date>2026-06-22T22:57:20.875609579</dc:date>
    <meta:editing-duration>PT27M14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1" meta:paragraph-count="3" meta:word-count="88" meta:character-count="548" meta:non-whitespace-character-count="463"/>
  </office:meta>
</office:document-meta>
</file>