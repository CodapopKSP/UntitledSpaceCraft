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264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2319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2.0756in"/>
    </style:style>
    <style:style style:name="co8" style:family="table-column">
      <style:table-column-properties fo:break-before="auto" style:column-width="0.1945in"/>
    </style:style>
    <style:style style:name="co9" style:family="table-column">
      <style:table-column-properties fo:break-before="auto" style:column-width="0.8807in"/>
    </style:style>
    <style:style style:name="co10" style:family="table-column">
      <style:table-column-properties fo:break-before="auto" style:column-width="0.7791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0.8846in"/>
    </style:style>
    <style:style style:name="co15" style:family="table-column">
      <style:table-column-properties fo:break-before="auto" style:column-width="0.88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689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244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7" style:family="table-row">
      <style:table-row-properties style:row-height="0.15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862in" fo:break-before="auto" style:use-optimal-row-height="false"/>
    </style:style>
    <style:style style:name="ro10" style:family="table-row">
      <style:table-row-properties style:row-height="0.339in" fo:break-before="auto" style:use-optimal-row-height="false"/>
    </style:style>
    <style:style style:name="ro11" style:family="table-row">
      <style:table-row-properties style:row-height="0.65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vertical-align="middle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579d1c" style:font-name="Times New Roman" fo:font-size="12pt" style:letter-kerning="true" fo:language="zxx" fo:country="none" style:language-asian="zxx" style:country-asian="none" style:language-complex="zxx" style:country-complex="none" style:font-name-asian="Andale Sans UI1" style:font-name-complex="Times New Roman" style:font-size-asian="12pt" style:font-size-complex="12pt"/>
    </style:style>
    <style:style style:name="T2" style:family="text">
      <style:text-properties style:font-name-asian="Andale Sans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font-name="Arial" style:language-complex="zxx" style:country-complex="non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/>
          <table:table-cell table:style-name="ce5" office:value-type="string" calcext:value-type="string" table:number-columns-spanned="5" table:number-rows-spanned="1">
            <text:p>Bill of Materials</text:p>
          </table:table-cell>
          <table:covered-table-cell table:style-name="ce12"/>
          <table:covered-table-cell/>
          <table:covered-table-cell table:number-columns-repeated="2" table:style-name="ce12"/>
          <table:table-cell table:style-name="ce1" table:number-columns-repeated="5"/>
          <table:table-cell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All parts are through-hole, 2.54mm pitch unless otherwise stated.</text:p>
          </table:table-cell>
          <table:covered-table-cell table:style-name="ce4"/>
          <table:covered-table-cell table:style-name="ce29"/>
          <table:covered-table-cell table:style-name="ce19"/>
          <table:covered-table-cell table:style-name="ce4"/>
          <table:table-cell table:style-name="ce1"/>
          <table:table-cell table:number-columns-repeated="5"/>
        </table:table-row>
        <table:table-row table:style-name="ro4">
          <table:table-cell/>
          <table:table-cell table:style-name="ce7" office:value-type="string" calcext:value-type="string" table:number-columns-spanned="5" table:number-rows-spanned="2">
            <text:p>Links are provided for convenience and may not correspond exactly to the recommended part. Always verify dimensions and specifications against the datasheet before ordering.</text:p>
          </table:table-cell>
          <table:covered-table-cell table:style-name="ce4"/>
          <table:covered-table-cell table:style-name="ce29"/>
          <table:covered-table-cell table:style-name="ce19"/>
          <table:covered-table-cell table:style-name="ce4"/>
          <table:table-cell table:style-name="ce1"/>
          <table:table-cell table:number-columns-repeated="5"/>
        </table:table-row>
        <table:table-row table:style-name="ro5">
          <table:table-cell/>
          <table:covered-table-cell table:number-columns-repeated="2" table:style-name="ce4"/>
          <table:covered-table-cell table:style-name="ce29"/>
          <table:covered-table-cell table:number-columns-repeated="2" table:style-name="ce4"/>
          <table:table-cell table:style-name="ce1"/>
          <table:table-cell table:number-columns-repeated="5"/>
        </table:table-row>
        <table:table-row table:style-name="ro7">
          <table:table-cell table:number-columns-repeated="4"/>
          <table:table-cell table:style-name="Default"/>
          <table:table-cell/>
          <table:table-cell table:style-name="ce1"/>
          <table:table-cell table:number-columns-repeated="5"/>
        </table:table-row>
        <table:table-row table:style-name="ro7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0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table-cell table:style-name="ce11" office:value-type="string" calcext:value-type="string" table:number-columns-spanned="1" table:number-rows-spanned="7">
            <text:p>All Modules</text:p>
          </table:table-cell>
          <table:table-cell table:style-name="ce10" office:value-type="string" calcext:value-type="string">
            <text:p><text:a xlink:href="https://www.ribbon-cable.com/product/16-pin-idc-flat-ribbon-cable-2mm-pitch/" xlink:type="simple">2.0mm Pitch 16pin Connector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en.wikipedia.org/wiki/Electrolytic_capacitor" xlink:type="simple">Electrolytic Cap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uf 16v</text:p>
          </table:table-cell>
          <table:table-cell table:style-name="ce10" office:value-type="string" calcext:value-type="string">
            <text:p>Main power decoupling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ound Neodymium Magnets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5mm/5mm</text:p>
          </table:table-cell>
          <table:table-cell table:style-name="ce10" office:value-type="string" calcext:value-type="string">
            <text:p>Requires high precision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PCB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Acrylic Face Plate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Screw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3M, 15mm</text:p>
          </table:table-cell>
          <table:table-cell table:style-name="ce10" office:value-type="string" calcext:value-type="string">
            <text:p>Telemetry needs 4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3M</text:p>
          </table:table-cell>
          <table:table-cell table:style-name="ce10" office:value-type="string" calcext:value-type="string">
            <text:p>Telemetry needs 16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table-cell table:style-name="ce11" office:value-type="string" calcext:value-type="string" table:number-columns-spanned="1" table:number-rows-spanned="8">
            <text:p>Abort</text:p>
          </table:table-cell>
          <table:table-cell table:style-name="ce10" office:value-type="string" calcext:value-type="string">
            <text:p><text:a xlink:href="https://www.canal.com.tw/product/switches/push-switches/pbs-series-push-switch-up-to-1a-125vac" xlink:type="simple">Circle Butto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, 12mm</text:p>
          </table:table-cell>
          <table:table-cell table:style-name="ce10" office:value-type="string" calcext:value-type="string">
            <text:p>OFF-(ON)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business.walmart.com/ip/Safety-Toggle-Switch-SPDT-20-Amp-Transparent-Green/821345913" xlink:type="simple">Safety Switch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protosupplies.com/wp-content/uploads/2019/10/LED-10mm-Green-5-Pack.jpg" xlink:type="simple">LED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, 10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i.sstatic.net/04Nrr.jpg" xlink:type="simple">Ceramic Capacitor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table-cell table:style-name="ce11" office:value-type="string" calcext:value-type="string" table:number-columns-spanned="1" table:number-rows-spanned="11">
            <text:p>Action Groups</text:p>
          </table:table-cell>
          <table:table-cell table:style-name="ce10" office:value-type="string" calcext:value-type="string">
            <text:p><text:a xlink:href="https://www.canal.com.tw/product/switches/push-switches/ps17-6-push-switch-3a-125vac" xlink:type="simple">Square Button</text:a>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www.make-it.ca/wp-content/uploads/2021/09/3mm-leds-featured.jpg" xlink:type="simple">LED</text:a>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Blue, 3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www.aliexpress.com/item/1005007392371820.html?spm=a2g0o.productlist.main.1.6b973dcbcpLVqd&amp;algo_pvid=80f6ae94-7281-40c0-9aa2-dbb11f874fc8&amp;algo_exp_id=80f6ae94-7281-40c0-9aa2-dbb11f874fc8-0&amp;pdp_ext_f=%7B%22order%22%3A%22147%22%2C%22eval%22%3A%221%22%2C%22fromPage%22%3A%22search%22%7D&amp;pdp_npi=6%40dis%21TWD%2180.59%2142.59%21%21%212.46%211.30%21%402101584917818778264738575eecde%2112000040560529998%21sea%21TW%210%21ABX%211%210%21n_tag%3A-29910%3Bd%3A31c56f85%3Bm03_new_user%3A-29895&amp;curPageLogUid=CcsVxI7aI7BB&amp;utparam-url=scene%3Asearch%7Cquery_from%3A%7Cx_object_id%3A1005007392371820%7C_p_origin_prod%3A" xlink:type="simple">LED Socket</text:a>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3mm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62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31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table-cell table:style-name="ce11" office:value-type="string" calcext:value-type="string" table:number-columns-spanned="1" table:number-rows-spanned="10">
            <text:p>Analog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a xlink:href="https://media.cablematic.com/__sized__/images_1000/tg12700-03-thumbnail-1080x1080-70.jpg" xlink:type="simple">Switch</text:a>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<text:span text:style-name="T2"><text:a xlink:href="https://shop.pimoroni.com/products/3-axis-joystick-with-button?variant=40408724570195" xlink:type="simple">JH-D400X Joystick</text:a></text:span>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4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7" calcext:value-type="float">
            <text:p>7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style-name="ce1"/>
          <table:table-cell table:number-columns-repeated="5"/>
        </table:table-row>
        <table:table-row table:style-name="ro7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style-name="ce1"/>
          <table:table-cell table:number-columns-repeated="5"/>
        </table:table-row>
        <table:table-row table:style-name="ro6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2">
            <text:p>Analog Throttle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Blu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Potentiomete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B20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Potentiometer Cover Dial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8">
            <text:p>Camera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2" calcext:value-type="float">
            <text:p>2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 table:number-rows-repeated="3">
          <table:table-cell table:number-columns-repeated="12"/>
        </table:table-row>
        <table:table-row table:style-name="ro9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8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0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Control Systems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Orange, 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2" calcext:value-type="float">
            <text:p>22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6" office:value-type="string" calcext:value-type="string" table:number-columns-spanned="1" table:number-rows-spanned="19">
            <text:p>Executive Actions (Control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Blu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ircl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 office:value-type="string" calcext:value-type="string">
            <text:p>OFF-(ON)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www.adafruit.com/product/1439" xlink:type="simple">LED Butto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i.ebayimg.com/images/g/6vMAAOSwi8NlVT3R/s-l400.jpg" xlink:type="simple">Button Safety Cover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22x24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www.canal.com.tw/product/switches/keylock-switches/s1091b-Ø12" xlink:type="simple">Key Switch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Orange, 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Blue, 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6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6" office:value-type="string" calcext:value-type="string" table:number-columns-spanned="1" table:number-rows-spanned="16">
            <text:p>Executive Actions (Groups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Blu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ircl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 office:value-type="string" calcext:value-type="string">
            <text:p>OFF-(ON)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Button Safety Cove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22x24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Key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Blue, 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3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7" calcext:value-type="float">
            <text:p>7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6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2">
            <text:p>Executive Actions</text:p>
          </table:table-cell>
          <table:table-cell table:style-name="ce10" office:value-type="string" calcext:value-type="string">
            <text:p>Circl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2mm</text:p>
          </table:table-cell>
          <table:table-cell table:style-name="ce10" office:value-type="string" calcext:value-type="string">
            <text:p>OFF-(ON)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Red, 1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Button Safety Cove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24x2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Key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2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www.pcboard.ca/image/cache/catalog/products/leds/5mm-led-assortment-02-800x800.jpg" xlink:type="simple">LED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5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5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 table:number-rows-repeated="4">
          <table:table-cell table:number-columns-repeated="4"/>
          <table:table-cell table:style-name="Default"/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7"/>
        </table:table-row>
        <table:table-row table:style-name="ro8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0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EVA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6" calcext:value-type="float">
            <text:p>6</text:p>
          </table:table-cell>
          <table:table-cell table:style-name="ce14" office:value-type="string" calcext:value-type="string">
            <text:p>White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cdn.shpy.in/224437/1663567579971_SKU-4824_0.jpg?width=1200" xlink:type="simple">LED Array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4" calcext:value-type="float">
            <text:p>4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1" calcext:value-type="float">
            <text:p>11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59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9">
            <text:p>Navigation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6" calcext:value-type="float">
            <text:p>6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cdn.shopify.com/s/files/1/0080/6617/0943/products/TB-SK0964_1000x1000.jpg?v=1571712072" xlink:type="simple">LED Switch</text:a>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3">
            <text:p>Natigation (Time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Yellow, 1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D36 LED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twcn.rs-online.com/web/p/rocker-switches/0119704" xlink:type="simple">6P Rocker Switch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Rotation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6" calcext:value-type="float">
            <text:p>6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Rotation (Throttle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cdn1.botland.store/98376-pdt_540/rotary-potentiometer-20kohm-linear-1-5w-b20k-5szt.jpg" xlink:type="simple">Potentiometer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B20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Potentiometer Cover Dial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8" table:number-rows-repeated="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8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0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8">
            <text:p>Stage</text:p>
          </table:table-cell>
          <table:table-cell table:style-name="ce10" office:value-type="string" calcext:value-type="string">
            <text:p>Circl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Green, 12mm</text:p>
          </table:table-cell>
          <table:table-cell table:style-name="ce10" office:value-type="string" calcext:value-type="string">
            <text:p>OFF-(ON)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afety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Green, 10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50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6">
            <text:p>Telemetry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infodatasheet.com/st7920-lcd-128x64-datasheet.html" xlink:type="simple">LCD Scree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28x64</text:p>
          </table:table-cell>
          <table:table-cell table:style-name="ce10" office:value-type="string" calcext:value-type="string">
            <text:p>ST7920 driven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Header Pins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x20 Pin</text:p>
          </table:table-cell>
          <table:table-cell table:style-name="ce10" office:value-type="string" calcext:value-type="string">
            <text:p>Not socket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Washer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string" calcext:value-type="string">
            <text:p>3M</text:p>
          </table:table-cell>
          <table:table-cell table:style-name="ce10" office:value-type="string" calcext:value-type="string">
            <text:p>Depends on thickness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rduino Nano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Throttle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Red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SPDT 3-Pos</text:p>
          </table:table-cell>
          <table:table-cell table:style-name="ce10" office:value-type="string" calcext:value-type="string">
            <text:p>ON-OFF-ON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c1.neweggimages.com/ProductImageCompressAll1280/A27C_1_201711291304733131.jpg" xlink:type="simple">Potentiometer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B20k, 6 Pin</text:p>
          </table:table-cell>
          <table:table-cell table:style-name="ce10" office:value-type="string" calcext:value-type="string">
            <text:p>Two parallel channels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Throttle Lever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 office:value-type="string" calcext:value-type="string">
            <text:p>3D printed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Throttle Friction Mechanism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 office:value-type="string" calcext:value-type="string">
            <text:p>3D printed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images.tcdn.com.br/img/img_prod/557243/diodo_retificador_1n4148_1379_2_84405ccb67faa74bc7f9ee7afd4bd90a.png" xlink:type="simple">Diode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N4148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5</text:p>
          </table:table-cell>
          <table:table-cell table:style-name="ce31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Time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Button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Yellow, 16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6P Rocker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300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7">
            <text:p>Translation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Green, 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witch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SPST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JH-D400X Joystick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4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24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3">
            <text:p>Utility (Navigation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D36 LED Switch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Yello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Array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1.5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 table:number-rows-repeated="6">
          <table:table-cell table:number-columns-repeated="4"/>
          <table:table-cell table:style-name="Default"/>
          <table:table-cell table:number-columns-repeated="7"/>
        </table:table-row>
        <table:table-row table:style-name="ro10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8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Part</text:p>
          </table:table-cell>
          <table:table-cell table:style-name="ce30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ote</text:p>
          </table:table-cell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1">
            <text:p>Utility (Time)</text:p>
          </table:table-cell>
          <table:table-cell table:style-name="ce10" office:value-type="string" calcext:value-type="string">
            <text:p>Square Button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Square Button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LED Array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Green, 10 LED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8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hip Socket</text:p>
          </table:table-cell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16 Pin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10" calcext:value-type="float">
            <text:p>10</text:p>
          </table:table-cell>
          <table:table-cell table:style-name="ce14" office:value-type="string" calcext:value-type="string">
            <text:p>1.2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10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Ceramic Capacitor</text:p>
          </table:table-cell>
          <table:table-cell table:style-name="ce31" office:value-type="float" office:value="5" calcext:value-type="float">
            <text:p>5</text:p>
          </table:table-cell>
          <table:table-cell table:style-name="ce14" office:value-type="string" calcext:value-type="string">
            <text:p>100nf</text:p>
          </table:table-cell>
          <table:table-cell table:style-name="ce10" office:value-type="string" calcext:value-type="string">
            <text:p>Type 104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ttiny4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595</text:p>
          </table:table-cell>
          <table:table-cell table:style-name="ce31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74HC165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6">
            <text:p>Quad Hub</text:p>
          </table:table-cell>
          <table:table-cell table:style-name="ce10" office:value-type="string" calcext:value-type="string">
            <text:p>2.0mm Pitch 16pin Connector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4.7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31" office:value-type="float" office:value="6" calcext:value-type="float">
            <text:p>6</text:p>
          </table:table-cell>
          <table:table-cell table:style-name="ce14" office:value-type="string" calcext:value-type="string">
            <text:p>3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rduino Micro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Can be substituted with a Nano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Header Sockets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5 Pin, Socket</text:p>
          </table:table-cell>
          <table:table-cell table:style-name="ce10" office:value-type="string" calcext:value-type="string">
            <text:p>For the arduino to slot into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Barrel Jack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2.1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6">
            <text:p>Octo Hub</text:p>
          </table:table-cell>
          <table:table-cell table:style-name="ce10" office:value-type="string" calcext:value-type="string">
            <text:p>2.0mm Pitch 16pin Connector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string" calcext:value-type="string">
            <text:p>Socket</text:p>
          </table:table-cell>
          <table:table-cell table:style-name="ce10" office:value-type="string" calcext:value-type="string">
            <text:p>Standard module connector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Resistor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4.7k, 1/4W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Nut</text:p>
          </table:table-cell>
          <table:table-cell table:style-name="ce31" office:value-type="float" office:value="6" calcext:value-type="float">
            <text:p>6</text:p>
          </table:table-cell>
          <table:table-cell table:style-name="ce14" office:value-type="string" calcext:value-type="string">
            <text:p>3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rduino Micro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Can be substituted with a Nano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Header Sockets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15 Pin, Socket</text:p>
          </table:table-cell>
          <table:table-cell table:style-name="ce10" office:value-type="string" calcext:value-type="string">
            <text:p>For the arduino to slot into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Barrel Jack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2.1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7">
            <text:p>Miscellaneous</text:p>
          </table:table-cell>
          <table:table-cell table:style-name="ce10" office:value-type="string" calcext:value-type="string">
            <text:p>Power Supply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5V</text:p>
          </table:table-cell>
          <table:table-cell table:style-name="ce10" office:value-type="string" calcext:value-type="string">
            <text:p>Center 5V, Sleeve ground</text:p>
          </table:table-cell>
          <table:table-cell table:number-columns-repeated="6"/>
        </table:table-row>
        <table:table-row table:style-name="ro8">
          <table:table-cell/>
          <table:covered-table-cell table:style-name="ce11"/>
          <table:table-cell table:style-name="ce10" office:value-type="string" calcext:value-type="string">
            <text:p>Micro USB cable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11"/>
          <table:table-cell table:style-name="ce10" office:value-type="string" calcext:value-type="string">
            <text:p>Neodymium Magnets</text:p>
          </table:table-cell>
          <table:table-cell table:style-name="ce31" office:value-type="float" office:value="10" calcext:value-type="float">
            <text:p>10</text:p>
          </table:table-cell>
          <table:table-cell table:style-name="ce14" office:value-type="string" calcext:value-type="string">
            <text:p>5mm/5mm</text:p>
          </table:table-cell>
          <table:table-cell table:style-name="ce10"/>
          <table:table-cell table:number-columns-repeated="6"/>
        </table:table-row>
        <table:table-row table:style-name="ro8">
          <table:table-cell/>
          <table:covered-table-cell table:style-name="ce11"/>
          <table:table-cell table:style-name="ce10" office:value-type="string" calcext:value-type="string">
            <text:p>Ribbon Cable</text:p>
          </table:table-cell>
          <table:table-cell table:style-name="ce31" office:value-type="string" calcext:value-type="string">
            <text:p>2-3m</text:p>
          </table:table-cell>
          <table:table-cell table:style-name="ce14" office:value-type="string" calcext:value-type="string">
            <text:p>16 wire, 1mm</text:p>
          </table:table-cell>
          <table:table-cell table:style-name="ce10" office:value-type="string" calcext:value-type="string">
            <text:p>Depending on size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Ink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Black</text:p>
          </table:table-cell>
          <table:table-cell table:style-name="ce10" office:value-type="string" calcext:value-type="string">
            <text:p>Alcohol or acetone based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Acrylic Container</text:p>
          </table:table-cell>
          <table:table-cell table:style-name="ce31" office:value-type="float" office:value="1" calcext:value-type="float">
            <text:p>1</text:p>
          </table:table-cell>
          <table:table-cell table:style-name="ce14"/>
          <table:table-cell table:style-name="ce10" office:value-type="string" calcext:value-type="string">
            <text:p>Depending on size</text:p>
          </table:table-cell>
          <table:table-cell table:number-columns-repeated="6"/>
        </table:table-row>
        <table:table-row table:style-name="ro8">
          <table:table-cell/>
          <table:covered-table-cell table:style-name="ce6"/>
          <table:table-cell table:style-name="ce10" office:value-type="string" calcext:value-type="string">
            <text:p><text:a xlink:href="https://www.ribbon-cable.com/product/16-pin-idc-flat-ribbon-cable-2mm-pitch/" xlink:type="simple">2.0mm Pitch 16pin Connector</text:a></text:p>
          </table:table-cell>
          <table:table-cell table:style-name="ce31" office:value-type="string" calcext:value-type="string">
            <text:p>2-16</text:p>
          </table:table-cell>
          <table:table-cell table:style-name="ce14" office:value-type="string" calcext:value-type="string">
            <text:p>Pin</text:p>
          </table:table-cell>
          <table:table-cell table:style-name="ce10" office:value-type="string" calcext:value-type="string">
            <text:p>Two per module</text:p>
          </table:table-cell>
          <table:table-cell table:number-columns-repeated="6"/>
        </table:table-row>
        <table:table-row table:style-name="ro8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Required Tool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/>
          <table:table-cell table:style-name="ce18" office:value-type="string" calcext:value-type="string">
            <text:p>• Soldering iron and all relevant materials (solder, flux, etc.)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Wire (standard hobby gauge, ~22-24 AWG)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Wire strippers/cutters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Pliers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Screwdriver, with different size tips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Vise/vice or some reliable way to compress objects</text:p>
          </table:table-cell>
          <table:table-cell table:number-columns-repeated="10"/>
        </table:table-row>
        <table:table-row table:style-name="ro13">
          <table:table-cell/>
          <table:table-cell table:style-name="ce20" office:value-type="string" calcext:value-type="string">
            <text:p>• 8mm wrench <text:span text:style-name="T1">(for all switches and 3mm LEDs)</text:span></text:p>
          </table:table-cell>
          <table:table-cell table:number-columns-repeated="10"/>
        </table:table-row>
        <table:table-row table:style-name="ro13">
          <table:table-cell/>
          <table:table-cell table:style-name="ce20" office:value-type="string" calcext:value-type="string">
            <text:p>• 9mm wrench <text:span text:style-name="T1">(Analog Throttle and Rotation Throttle modules)</text:span></text:p>
          </table:table-cell>
          <table:table-cell table:number-columns-repeated="10"/>
        </table:table-row>
        <table:table-row table:style-name="ro13">
          <table:table-cell/>
          <table:table-cell table:style-name="ce20" office:value-type="string" calcext:value-type="string">
            <text:p>• 15mm wrench <text:span text:style-name="T1">(Executive Actions, Stage, Abort modules)</text:span>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Ink (for lettering, black or your choice)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A suitable way to clean the ink (such as acetone-based nail polish remover)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Silicone caulk (clear or the color of your container)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A breadboard</text:p>
          </table:table-cell>
          <table:table-cell table:number-columns-repeated="10"/>
        </table:table-row>
        <table:table-row table:style-name="ro12">
          <table:table-cell/>
          <table:table-cell table:style-name="ce18" office:value-type="string" calcext:value-type="string">
            <text:p>• Arduino IDE software or similar</text:p>
          </table:table-cell>
          <table:table-cell table:number-columns-repeated="10"/>
        </table:table-row>
        <table:table-row table:style-name="ro12">
          <table:table-cell/>
          <table:table-cell table:style-name="ce21" office:value-type="string" calcext:value-type="string">
            <text:p>• Multimeter</text:p>
          </table:table-cell>
          <table:table-cell table:number-columns-repeated="10"/>
        </table:table-row>
        <table:table-row table:style-name="ro8" table:number-rows-repeated="1048268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Sheet2" table:style-name="ta1" table:print="false">
        <table:table-column table:style-name="co14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5in" fo:margin-right="0in" style:first-page-number="continue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2H8M23S</meta:editing-duration>
    <meta:editing-cycles>58</meta:editing-cycles>
    <meta:generator>LibreOffice/7.3.7.2$Linux_X86_64 LibreOffice_project/30$Build-2</meta:generator>
    <dc:date>2026-06-23T01:07:28.465410345</dc:date>
    <meta:document-statistic meta:table-count="3" meta:cell-count="828" meta:object-count="0"/>
    <meta:user-defined meta:name="Info 1"/>
    <meta:user-defined meta:name="Info 2"/>
    <meta:user-defined meta:name="Info 3"/>
    <meta:user-defined meta:name="Info 4"/>
  </office:meta>
</office:document-meta>
</file>