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264in"/>
    </style:style>
    <style:style style:name="co2" style:family="table-column">
      <style:table-column-properties fo:break-before="auto" style:column-width="1.3346in"/>
    </style:style>
    <style:style style:name="co3" style:family="table-column">
      <style:table-column-properties fo:break-before="auto" style:column-width="2.2319in"/>
    </style:style>
    <style:style style:name="co4" style:family="table-column">
      <style:table-column-properties fo:break-before="auto" style:column-width="0.3701in"/>
    </style:style>
    <style:style style:name="co5" style:family="table-column">
      <style:table-column-properties fo:break-before="auto" style:column-width="1.189in"/>
    </style:style>
    <style:style style:name="co6" style:family="table-column">
      <style:table-column-properties fo:break-before="auto" style:column-width="2.0756in"/>
    </style:style>
    <style:style style:name="co7" style:family="table-column">
      <style:table-column-properties fo:break-before="auto" style:column-width="0.1945in"/>
    </style:style>
    <style:style style:name="co8" style:family="table-column">
      <style:table-column-properties fo:break-before="auto" style:column-width="0.8807in"/>
    </style:style>
    <style:style style:name="co9" style:family="table-column">
      <style:table-column-properties fo:break-before="auto" style:column-width="0.7791in"/>
    </style:style>
    <style:style style:name="co10" style:family="table-column">
      <style:table-column-properties fo:break-before="auto" style:column-width="0.2138in"/>
    </style:style>
    <style:style style:name="co11" style:family="table-column">
      <style:table-column-properties fo:break-before="auto" style:column-width="1.1252in"/>
    </style:style>
    <style:style style:name="co12" style:family="table-column">
      <style:table-column-properties fo:break-before="auto" style:column-width="0.8846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3256in" fo:break-before="auto" style:use-optimal-row-height="false"/>
    </style:style>
    <style:style style:name="ro2" style:family="table-row">
      <style:table-row-properties style:row-height="0.1598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ce20" office:value-type="string" calcext:value-type="string" table:number-columns-spanned="5" table:number-rows-spanned="1">
            <text:p>Bill of Materials</text:p>
          </table:table-cell>
          <table:covered-table-cell table:number-columns-repeated="4" table:style-name="ce12"/>
          <table:table-cell table:style-name="ce1" table:number-columns-repeated="5"/>
          <table:table-cell/>
        </table:table-row>
        <table:table-row table:style-name="ro2">
          <table:table-cell/>
          <table:table-cell office:value-type="string" calcext:value-type="string">
            <text:p>All parts are through-hole, 2.54mm pitch.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2">
          <table:table-cell table:number-columns-repeated="6"/>
          <table:table-cell table:style-name="ce1"/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Note</text:p>
          </table:table-cell>
          <table:table-cell table:style-name="ce1"/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7">
            <text:p>All Modules</text:p>
          </table:table-cell>
          <table:table-cell table:style-name="ce10" office:value-type="string" calcext:value-type="string">
            <text:p>2.0mm Pitch 16pin Connector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Socket</text:p>
          </table:table-cell>
          <table:table-cell table:style-name="ce10" office:value-type="string" calcext:value-type="string">
            <text:p>Standard module connector</text:p>
          </table:table-cell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Electrolytic Cap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10uf 16v</text:p>
          </table:table-cell>
          <table:table-cell table:style-name="ce10" office:value-type="string" calcext:value-type="string">
            <text:p>Main power decoupling</text:p>
          </table:table-cell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Round Neodymium Magnet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5mm/5mm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PCB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Acrylic Face Plate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Screw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3M, 15mm</text:p>
          </table:table-cell>
          <table:table-cell table:style-name="ce10" office:value-type="string" calcext:value-type="string">
            <text:p>Telemetry needs 4</text:p>
          </table:table-cell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Nut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3M</text:p>
          </table:table-cell>
          <table:table-cell table:style-name="ce10" office:value-type="string" calcext:value-type="string">
            <text:p>Telemetry needs 16</text:p>
          </table:table-cell>
          <table:table-cell table:style-name="ce1"/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8">
            <text:p>Abort</text:p>
          </table:table-cell>
          <table:table-cell table:style-name="ce10" office:value-type="string" calcext:value-type="string">
            <text:p>Circle Button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ed, 12mm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Safety Switch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ed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LED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ed, 10mm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.2K, 1/4W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Attiny25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1">
            <text:p>Action Groups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Blue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LED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Blue, 3mm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LED Socket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3mm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8 Pin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16 Pin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62k, 1/4W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10" office:value-type="float" office:value="2" calcext:value-type="float">
            <text:p>2</text:p>
          </table:table-cell>
          <table:table-cell table:style-name="ce13"/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10" office:value-type="float" office:value="2" calcext:value-type="float">
            <text:p>2</text:p>
          </table:table-cell>
          <table:table-cell table:style-name="ce13"/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74HC595</text:p>
          </table:table-cell>
          <table:table-cell table:style-name="ce10" office:value-type="float" office:value="2" calcext:value-type="float">
            <text:p>2</text:p>
          </table:table-cell>
          <table:table-cell table:style-name="ce13"/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Analog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Blue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SPST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SPDT 3-Pos</text:p>
          </table:table-cell>
          <table:table-cell table:style-name="ce10" office:value-type="string" calcext:value-type="string">
            <text:p>ON-OFF-ON</text:p>
          </table:table-cell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JH-D400X Joystick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14 Pin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16 Pin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Attiny24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10"/>
          <table:table-cell table:style-name="ce1"/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2">
            <text:p>Analog Throttle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Blue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3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SPST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SPDT 3-Pos</text:p>
          </table:table-cell>
          <table:table-cell table:style-name="ce10" office:value-type="string" calcext:value-type="string">
            <text:p>ON-OFF-ON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JH-D400X Joystick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14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ttiny24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Potentiometer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B20K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Potentiometer Cover Dial</text:p>
          </table:table-cell>
          <table:table-cell table:style-name="ce10"/>
          <table:table-cell table:style-name="ce13"/>
          <table:table-cell table:style-name="ce10"/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8">
            <text:p>Camera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Black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quare Button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White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10" office:value-type="float" office:value="2" calcext:value-type="float">
            <text:p>2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4" table:number-rows-repeated="6">
          <table:table-cell table:number-columns-repeated="12"/>
        </table:table-row>
        <table:table-row table:style-name="ro4">
          <table:table-cell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Note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11">
            <text:p>Control Systems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White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SPST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Orange, 3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 Socket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3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22" calcext:value-type="float">
            <text:p>22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table-cell table:style-name="ce7" office:value-type="string" calcext:value-type="string" table:number-columns-spanned="1" table:number-rows-spanned="19">
            <text:p>Executive Actions (Control)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White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quare Button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lue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ircle Button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Green, 12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 Button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ed, 16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Button Safety Cove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x24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PST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Key Switch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2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Orange, 3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lue, 3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 Socket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3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.2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2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595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table-cell table:style-name="ce7" office:value-type="string" calcext:value-type="string" table:number-columns-spanned="1" table:number-rows-spanned="16">
            <text:p>Executive Actions (Groups)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Blue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ircle Button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Green, 12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 Button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ed, 16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Button Safety Cove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x24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Key Switch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2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Blue, 3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 Socket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3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.2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62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595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12">
            <text:p>Executive Actions</text:p>
          </table:table-cell>
          <table:table-cell table:style-name="ce10" office:value-type="string" calcext:value-type="string">
            <text:p>Circle Button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Green, 12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 Button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ed, 16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Button Safety Cove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4x26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Key Switch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2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Green, 5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5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00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.2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ttiny25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 table:number-rows-repeated="3">
          <table:table-cell table:number-columns-repeated="12"/>
        </table:table-row>
        <table:table-row table:style-name="ro4">
          <table:table-cell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Note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11">
            <text:p>EVA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White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quare Button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Gree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 Array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Green, 10 LED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1.2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1595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9">
            <text:p>Navigation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Black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D36 LED Switch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Yello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.5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13">
            <text:p>Natigation (Time)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lack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quare Button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Yello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 Button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Yellow, 16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D36 LED Switch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Yello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6P Rocker Switch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00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.5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10">
            <text:p>Rotation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Green, 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PST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SPDT 3-Pos</text:p>
          </table:table-cell>
          <table:table-cell table:style-name="ce10" office:value-type="string" calcext:value-type="string">
            <text:p>ON-OFF-ON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JH-D400X Joystick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4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ttiny24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11">
            <text:p>Rotation (Throttle)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Green, 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PST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SPDT 3-Pos</text:p>
          </table:table-cell>
          <table:table-cell table:style-name="ce10" office:value-type="string" calcext:value-type="string">
            <text:p>ON-OFF-ON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JH-D400X Joystick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4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ttiny24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Potentiometer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B20K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Potentiometer Cover Dial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4" table:number-rows-repeated="7">
          <table:table-cell table:number-columns-repeated="12"/>
        </table:table-row>
        <table:table-row table:style-name="ro4">
          <table:table-cell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Note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8">
            <text:p>Stage</text:p>
          </table:table-cell>
          <table:table-cell table:style-name="ce10" office:value-type="string" calcext:value-type="string">
            <text:p>Circle Butt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Green, 12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afety Switch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Green, 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Green, 10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150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ttiny25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6">
            <text:p>Telemetry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Black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CD Scree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128x64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Header Pin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1x20 Pin</text:p>
          </table:table-cell>
          <table:table-cell table:style-name="ce10" office:value-type="string" calcext:value-type="string">
            <text:p>Not socket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Washer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3M</text:p>
          </table:table-cell>
          <table:table-cell table:style-name="ce10" office:value-type="string" calcext:value-type="string">
            <text:p>Depends on thickness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rduino Nano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11">
            <text:p>Throttle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Yello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quare Butt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Red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SPDT 3-Pos</text:p>
          </table:table-cell>
          <table:table-cell table:style-name="ce10" office:value-type="string" calcext:value-type="string">
            <text:p>ON-OFF-ON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Potentiometer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B20k, 6 Pin</text:p>
          </table:table-cell>
          <table:table-cell table:style-name="ce10" office:value-type="string" calcext:value-type="string">
            <text:p>Two parallel channels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Throttle Lever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10" office:value-type="string" calcext:value-type="string">
            <text:p>3D printed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Throttle Friction Mechanism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10" office:value-type="string" calcext:value-type="string">
            <text:p>3D printed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Diod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1N4148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ttiny25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11">
            <text:p>Time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lack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quare Button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Yello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 Button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Yellow, 16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6P Rocker Switch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00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7">
            <text:p>Translation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Green, 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PST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JH-D400X Joystick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4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ttiny24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13">
            <text:p>Utility (Navigation)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lack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quare Button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Gree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D36 LED Switch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Yello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 Array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Green, 10 LED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1.2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.5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595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 table:number-rows-repeated="5">
          <table:table-cell table:number-columns-repeated="12"/>
        </table:table-row>
        <table:table-row table:style-name="ro4">
          <table:table-cell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Note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11">
            <text:p>Utility (Time)</text:p>
          </table:table-cell>
          <table:table-cell table:style-name="ce10" office:value-type="string" calcext:value-type="string">
            <text:p>Square Button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lack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Square Button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Gree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LED Array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Green, 10 LED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1.2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595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6">
            <text:p>Quad Hub</text:p>
          </table:table-cell>
          <table:table-cell table:style-name="ce10" office:value-type="string" calcext:value-type="string">
            <text:p>2.0mm Pitch 16pin Connector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Socket</text:p>
          </table:table-cell>
          <table:table-cell table:style-name="ce10" office:value-type="string" calcext:value-type="string">
            <text:p>Standard module connector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.7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Nut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3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rduino Micro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 office:value-type="string" calcext:value-type="string">
            <text:p>Can be substituted with a Nano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Header Sockets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5 Pin, Socket</text:p>
          </table:table-cell>
          <table:table-cell table:style-name="ce10" office:value-type="string" calcext:value-type="string">
            <text:p>For the arduino to slot into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Barrel Jack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.1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6">
            <text:p>Octo Hub</text:p>
          </table:table-cell>
          <table:table-cell table:style-name="ce10" office:value-type="string" calcext:value-type="string">
            <text:p>2.0mm Pitch 16pin Connector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Socket</text:p>
          </table:table-cell>
          <table:table-cell table:style-name="ce10" office:value-type="string" calcext:value-type="string">
            <text:p>Standard module connector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.7k, 1/4W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Nut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3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rduino Micro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 office:value-type="string" calcext:value-type="string">
            <text:p>Can be substituted with a Nano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Header Sockets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5 Pin, Socket</text:p>
          </table:table-cell>
          <table:table-cell table:style-name="ce10" office:value-type="string" calcext:value-type="string">
            <text:p>For the arduino to slot into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Barrel Jack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.1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" table:number-rows-spanned="6">
            <text:p>Miscellaneous</text:p>
          </table:table-cell>
          <table:table-cell table:style-name="ce10" office:value-type="string" calcext:value-type="string">
            <text:p>Power Supply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5V</text:p>
          </table:table-cell>
          <table:table-cell table:style-name="ce10" office:value-type="string" calcext:value-type="string">
            <text:p>Center 5V, Sleeve ground</text:p>
          </table:table-cell>
          <table:table-cell table:number-columns-repeated="6"/>
        </table:table-row>
        <table:table-row table:style-name="ro4">
          <table:table-cell/>
          <table:covered-table-cell table:style-name="ce4"/>
          <table:table-cell table:style-name="ce10" office:value-type="string" calcext:value-type="string">
            <text:p>Micro USB cable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4"/>
          <table:table-cell table:style-name="ce10" office:value-type="string" calcext:value-type="string">
            <text:p>Neodymium Magnets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5mm/5mm</text:p>
          </table:table-cell>
          <table:table-cell table:style-name="ce10"/>
          <table:table-cell table:number-columns-repeated="6"/>
        </table:table-row>
        <table:table-row table:style-name="ro4">
          <table:table-cell/>
          <table:covered-table-cell table:style-name="ce4"/>
          <table:table-cell table:style-name="ce10" office:value-type="string" calcext:value-type="string">
            <text:p>Ribbon Cable</text:p>
          </table:table-cell>
          <table:table-cell table:style-name="ce10" office:value-type="string" calcext:value-type="string">
            <text:p>2-3m</text:p>
          </table:table-cell>
          <table:table-cell table:style-name="ce14" office:value-type="string" calcext:value-type="string">
            <text:p>16 wire, 1mm</text:p>
          </table:table-cell>
          <table:table-cell table:style-name="ce10" office:value-type="string" calcext:value-type="string">
            <text:p>Depending on size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Ink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lack</text:p>
          </table:table-cell>
          <table:table-cell table:style-name="ce10" office:value-type="string" calcext:value-type="string">
            <text:p>Alcohol or acetone based</text:p>
          </table:table-cell>
          <table:table-cell table:number-columns-repeated="6"/>
        </table:table-row>
        <table:table-row table:style-name="ro4">
          <table:table-cell/>
          <table:covered-table-cell table:style-name="ce6"/>
          <table:table-cell table:style-name="ce10" office:value-type="string" calcext:value-type="string">
            <text:p>Acrylic Container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 office:value-type="string" calcext:value-type="string">
            <text:p>Depending on size</text:p>
          </table:table-cell>
          <table:table-cell table:number-columns-repeated="6"/>
        </table:table-row>
        <table:table-row table:style-name="ro4" table:number-rows-repeated="1048293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Sheet2" table:style-name="ta1" table:print="false">
        <table:table-column table:style-name="co1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.5in" fo:margin-right="0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3H31M55S</meta:editing-duration>
    <meta:editing-cycles>46</meta:editing-cycles>
    <meta:generator>LibreOffice/7.3.7.2$Linux_X86_64 LibreOffice_project/30$Build-2</meta:generator>
    <dc:date>2026-06-19T21:31:05.766695218</dc:date>
    <meta:document-statistic meta:table-count="3" meta:cell-count="795" meta:object-count="0"/>
    <meta:user-defined meta:name="Info 1"/>
    <meta:user-defined meta:name="Info 2"/>
    <meta:user-defined meta:name="Info 3"/>
    <meta:user-defined meta:name="Info 4"/>
  </office:meta>
</office:document-meta>
</file>