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33B3B5736290285F914.png" manifest:media-type="image/png"/>
  <manifest:file-entry manifest:full-path="Pictures/10009DCD00004912000063DCFF59ED94C8C9B340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72e37" officeooo:paragraph-rsid="001da67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c32e5" officeooo:paragraph-rsid="001c32e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ea305" officeooo:paragraph-rsid="002ea305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ea305" officeooo:paragraph-rsid="002ea30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rmware Execution Flow</text:p>
      <text:p text:style-name="P2"/>
      <text:p text:style-name="P4">Untitled Space Craft firmware is written in C/C++ and can be easily managed with the Arduino IDE. When the controller is powered on, the hub will perform a setup sequence where it manages libraries and initializes the modules.</text:p>
      <text:p text:style-name="P4"/>
      <text:p text:style-name="P4">Once it is ready, it will repeatedly attempt to connect to Simpit for either KSP1 or KSP2. During this time, if 3 repeated inputs are detected, it will enter Keyboard Emulation mode. If the connection to Simpit is successful, it will enter KSP mode.</text:p>
      <text:p text:style-name="P1"><draw:frame draw:style-name="fr1" draw:name="Image1" text:anchor-type="char" svg:x="0.4618in" svg:y="0.2319in" svg:width="5.811in" svg:height="7.9409in" draw:z-index="0"><draw:image xlink:href="Pictures/10009DCD00004912000063DCFF59ED94C8C9B340.svg" xlink:type="simple" xlink:show="embed" xlink:actuate="onLoad" draw:mime-type="image/svg+xml"/><draw:image xlink:href="Pictures/100000010000025D0000033B3B5736290285F9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20T20:52:19.657166870</meta:creation-date>
    <dc:date>2026-06-21T01:22:23.159798464</dc:date>
    <meta:editing-duration>PT30M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1" meta:paragraph-count="3" meta:word-count="85" meta:character-count="498" meta:non-whitespace-character-count="416"/>
  </office:meta>
</office:document-meta>
</file>