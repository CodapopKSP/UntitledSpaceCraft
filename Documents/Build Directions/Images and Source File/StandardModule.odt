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05D6FF6840B2F9B019.png" manifest:media-type="image/png"/>
  <manifest:file-entry manifest:full-path="Pictures/1000252B00003ED900001AF5FB4BDCDE785F40D2.svg" manifest:media-type="image/svg+xml"/>
  <manifest:file-entry manifest:full-path="Pictures/10000001000001F4000003D12ED9DE13E82A59B3.png" manifest:media-type="image/png"/>
  <manifest:file-entry manifest:full-path="Pictures/100000010000022F000001438F676DE049869567.png" manifest:media-type="image/png"/>
  <manifest:file-entry manifest:full-path="Pictures/100000010000013C00000153844BB31112C0B7EC.png" manifest:media-type="image/png"/>
  <manifest:file-entry manifest:full-path="Pictures/10005D25000039C0000021574C5BEDAF2EDCD33F.svg" manifest:media-type="image/svg+xml"/>
  <manifest:file-entry manifest:full-path="Pictures/10003868000020A400002306225BD42BD56075C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c32e5" officeooo:paragraph-rsid="001c32e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5a99f" officeooo:paragraph-rsid="0025a99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32e5" officeooo:paragraph-rsid="001c32e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a67f" officeooo:paragraph-rsid="001da67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2a57" officeooo:paragraph-rsid="001f2a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0c77" officeooo:paragraph-rsid="00210c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5a99f" officeooo:paragraph-rsid="0025a99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5a99f" officeooo:paragraph-rsid="0025a99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2e37" officeooo:paragraph-rsid="00272e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5a99f" officeooo:paragraph-rsid="0025a99f" style:font-size-asian="10.5pt" style:font-weight-asian="normal" style:font-size-complex="12pt" style:font-weight-complex="normal"/>
    </style:style>
    <style:style style:name="P12" style:family="paragraph" style:parent-style-name="Figure">
      <style:text-properties officeooo:paragraph-rsid="002d6cda"/>
    </style:style>
    <style:style style:name="T1" style:family="text">
      <style:text-properties officeooo:rsid="001da67f"/>
    </style:style>
    <style:style style:name="T2" style:family="text">
      <style:text-properties officeooo:rsid="001f2a57"/>
    </style:style>
    <style:style style:name="T3" style:family="text">
      <style:text-properties officeooo:rsid="00272e37"/>
    </style:style>
    <style:style style:name="T4" style:family="text">
      <style:text-properties officeooo:rsid="0027a27b"/>
    </style:style>
    <style:style style:name="T5" style:family="text">
      <style:text-properties officeooo:rsid="002b4fc7"/>
    </style:style>
    <style:style style:name="T6" style:family="text">
      <style:text-properties fo:font-weight="bold" officeooo:rsid="002b4fc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tandard Module</text:p>
      <text:p text:style-name="P10"/>
      <text:p text:style-name="P3">The standard module is the form factor that <text:span text:style-name="T1">governs the design of USC. Each module follows this same basic body plan.</text:span></text:p>
      <text:p text:style-name="P3"/>
      <text:p text:style-name="P4"><text:span text:style-name="T2">It</text:span> is 115mm square, with holes <text:span text:style-name="T2">that are 4.875mm in diameter and 99mm apart from their centers, and 5mm thick. The hole diameter is a function of the diameter of the neodymium magnets, the flexibility of the medium (typically acrylic), and the thickness and settings of the laser. It is advised to do a test cut first to guarantee a proper friction fit.</text:span></text:p>
      <text:p text:style-name="P4"/>
      <text:p text:style-name="P5"><draw:frame draw:style-name="fr3" draw:name="Image1" text:anchor-type="char" svg:x="1.5709in" svg:y="0.1319in" svg:width="3.2898in" svg:height="3.5299in" draw:z-index="0"><draw:image xlink:href="Pictures/10003868000020A400002306225BD42BD56075CC.svg" xlink:type="simple" xlink:show="embed" xlink:actuate="onLoad" draw:mime-type="image/svg+xml"/><draw:image xlink:href="Pictures/100000010000013C00000153844BB31112C0B7EC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module fits into the Module Slot. They have the same holes for magnets, 16mm apart where the module<draw:frame draw:style-name="fr2" draw:name="Image2" text:anchor-type="char" svg:x="0.3902in" svg:y="0.5575in" svg:width="5.8201in" svg:height="3.3602in" draw:z-index="2"><draw:image xlink:href="Pictures/10005D25000039C0000021574C5BEDAF2EDCD33F.svg" xlink:type="simple" xlink:show="embed" xlink:actuate="onLoad" draw:mime-type="image/svg+xml"/><draw:image xlink:href="Pictures/100000010000022F000001438F676DE049869567.png" xlink:type="simple" xlink:show="embed" xlink:actuate="onLoad" draw:mime-type="image/png"/></draw:frame>s touch. The <text:span text:style-name="T3">s</text:span>lots are 105mm square, with a 5mm edge (or 10mm between them).</text:p>
      <text:p text:style-name="P2"><text:soft-page-break/>Containers</text:p>
      <text:p text:style-name="P7"/>
      <text:p text:style-name="P8"><text:span text:style-name="T3">A container houses one or more standard modules and provides power and communication through the internal data bus.</text:span></text:p>
      <text:p text:style-name="P8"/>
      <text:p text:style-name="P8"><draw:frame draw:style-name="fr2" draw:name="Image3" text:anchor-type="char" svg:x="2.3398in" svg:y="0.1425in" svg:width="2.1638in" svg:height="4.2283in" draw:z-index="1"><draw:image xlink:href="Pictures/10000001000001F4000003D12ED9DE13E82A59B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ontainers have several measurements in common. <text:span text:style-name="T6">Their pieces should all be 5mm thick.</text:span><text:span text:style-name="T5"> </text:span>They are all 95.8mm tall on the back end. Containers that are two modules deep are 240mm long and 47.5mm tall on the short end. <text:span text:style-name="T5">The</text:span><text:span text:style-name="T4"> measurements </text:span><text:span text:style-name="T5">throughout the containers </text:span><text:span text:style-name="T4">may not be exact; typically they are a few fractions of a millimeter shorter in order to account for the space needed for the caulk adhesive.</text:span><draw:frame draw:style-name="fr1" draw:name="Image4" text:anchor-type="char" svg:x="0.189in" svg:y="1.2972in" svg:width="6.3339in" svg:height="2.7165in" draw:z-index="3"><draw:image xlink:href="Pictures/1000252B00003ED900001AF5FB4BDCDE785F40D2.svg" xlink:type="simple" xlink:show="embed" xlink:actuate="onLoad" draw:mime-type="image/svg+xml"/><draw:image xlink:href="Pictures/100000010000026000000105D6FF6840B2F9B0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2T23:10:01.931696051</dc:date>
    <meta:editing-duration>PT18M14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7" meta:word-count="208" meta:character-count="1190" meta:non-whitespace-character-count="989"/>
  </office:meta>
</office:document-meta>
</file>